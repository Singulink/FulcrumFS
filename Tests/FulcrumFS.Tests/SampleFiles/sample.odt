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language="en" fo:country="CA"/>
    </style:style>
  </office:automatic-styles>
  <office:body>
    <office:text text:use-soft-page-breaks="true">
      <text:p text:style-name="P1"><text:span text:style-name="T2">Sample docu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e Marynowski</meta:initial-creator>
    <dc:creator>Mike Marynowski</dc:creator>
    <meta:creation-date>2026-05-14T12:45:00Z</meta:creation-date>
    <dc:date>2026-05-14T12:45:00Z</dc:date>
    <meta:print-date>2026-05-14T12:4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